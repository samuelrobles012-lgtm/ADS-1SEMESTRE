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style:line-height-at-least="0.0208in" fo:text-indent="0.4923in"/>
      <style:text-properties style:font-name="Arial" style:font-name-complex="Arial" fo:font-weight="bold" style:font-weight-asian="bold" style:font-weight-complex="bold"/>
    </style:style>
    <style:style style:name="P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5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6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7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8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9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2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3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4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5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6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P19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2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3" style:parent-style-name="Normal" style:family="paragraph">
      <style:paragraph-properties fo:text-align="center">
        <style:tab-stops>
          <style:tab-stop style:type="left" style:position="1.9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4" style:parent-style-name="Normal" style:master-page-name="MP1" style:family="paragraph">
      <style:paragraph-properties fo:break-before="page" fo:text-align="center" style:page-number="1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T33" style:parent-style-name="Fonteparág.padrão" style:family="text">
      <style:text-properties style:font-name="Aptos" style:font-name-asian="Aptos" style:font-name-complex="Aptos"/>
    </style:style>
    <style:style style:name="P34" style:parent-style-name="Normal" style:master-page-name="MP2" style:family="paragraph">
      <style:paragraph-properties fo:break-before="page" fo:text-align="justify" style:line-height-at-least="0.0208in"/>
    </style:style>
    <style:style style:name="T36" style:parent-style-name="Fonteparág.padrão" style:family="text">
      <style:text-properties style:font-name="Arial" style:font-name-asian="Arial" style:font-name-complex="Arial" fo:language="en" fo:country="US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language="en" fo:country="US"/>
    </style:style>
    <style:style style:name="T38" style:parent-style-name="Fonteparág.padrão" style:family="text">
      <style:text-properties style:font-name="Arial" style:font-name-asian="Arial" style:font-name-complex="Arial" fo:language="en" fo:country="US"/>
    </style:style>
    <style:style style:name="T39" style:parent-style-name="Hyperlink" style:family="text">
      <style:text-properties style:font-name="Arial" style:font-name-asian="Arial" style:font-name-complex="Arial" fo:language="en" fo:country="US"/>
    </style:style>
    <style:style style:name="T40" style:parent-style-name="Fonteparág.padrão" style:family="text">
      <style:text-properties style:font-name="Arial" style:font-name-asian="Arial" style:font-name-complex="Arial" fo:language="en" fo:country="US"/>
    </style:style>
    <style:style style:name="P41" style:parent-style-name="Normal" style:family="paragraph">
      <style:paragraph-properties fo:text-align="justify" style:line-height-at-least="0.0208in"/>
      <style:text-properties style:font-name="Arial" style:font-name-asian="Arial" style:font-name-complex="Arial" fo:language="en" fo:country="US"/>
    </style:style>
    <style:style style:name="P42" style:parent-style-name="Normal" style:family="paragraph">
      <style:paragraph-properties fo:text-align="justify" style:line-height-at-least="0.0208in"/>
    </style:style>
    <style:style style:name="T43" style:parent-style-name="Fonteparág.padrão" style:family="text">
      <style:text-properties style:font-name="Arial" style:font-name-asian="Arial" style:font-name-complex="Arial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5" style:parent-style-name="Fonteparág.padrão" style:family="text">
      <style:text-properties style:font-name="Arial" style:font-name-asian="Arial" style:font-name-complex="Arial"/>
    </style:style>
    <style:style style:name="T46" style:parent-style-name="Hyperlink" style:family="text">
      <style:text-properties style:font-name="Arial" style:font-name-asian="Arial" style:font-name-complex="Arial"/>
    </style:style>
    <style:style style:name="T47" style:parent-style-name="Fonteparág.padrão" style:family="text">
      <style:text-properties style:font-name="Arial" style:font-name-asian="Arial" style:font-name-complex="Arial"/>
    </style:style>
    <style:style style:name="P48" style:parent-style-name="Normal" style:family="paragraph">
      <style:paragraph-properties fo:text-align="justify" style:line-height-at-least="0.0208in"/>
      <style:text-properties style:font-name="Arial" style:font-name-asian="Arial" style:font-name-complex="Arial"/>
    </style:style>
    <style:style style:name="P49" style:parent-style-name="Normal" style:family="paragraph">
      <style:paragraph-properties fo:text-align="justify" style:line-height-at-least="0.0208in"/>
      <style:text-properties style:font-name="Arial" style:font-name-asian="Arial" style:font-name-complex="Arial"/>
    </style:style>
  </office:automatic-styles>
  <office:body>
    <office:text text:use-soft-page-breaks="true">
      <text:p text:style-name="P1"/>
      <text:p text:style-name="P3"/>
      <text:p text:style-name="P4">FATEC – PROFESSOR ANTIONIO SEABRA</text:p>
      <text:p text:style-name="P5"/>
      <text:p text:style-name="P6"><text:line-break/></text:p>
      <text:p text:style-name="P7"/>
      <text:p text:style-name="P8"/>
      <text:p text:style-name="P9"><text:line-break/><text:span text:style-name="T10">LUÍS MIGUEL SCHIAZZA</text:span></text:p>
      <text:p text:style-name="P11">IGOR RODRIGUES DOS SANTOS</text:p>
      <text:p text:style-name="P12"/>
      <text:p text:style-name="P13"/>
      <text:p text:style-name="P14"/>
      <text:p text:style-name="P15"/>
      <text:p text:style-name="P16"><text:line-break/><text:line-break/><text:span text:style-name="T17">RELATÓRIO TÉCNICO – História dos Computadores Desde sua criação mais A</text:span><text:span text:style-name="T18">rcaica</text:span></text:p>
      <text:p text:style-name="P19"/>
      <text:p text:style-name="P20"/>
      <text:p text:style-name="P21"/>
      <text:p text:style-name="P22"/>
      <text:p text:style-name="P23"><text:line-break/><text:line-break/>PIRAJUÍ<text:s/>–<text:s/>SP<text:line-break/><text:line-break/>2026</text:p>
      <text:p text:style-name="P24">Evolução dos Computadores ao Longo das Gerações</text:p>
      <text:p text:style-name="P26"/>
      <text:p text:style-name="Normal">A evolução dos computadores aconteceu ao longo de várias gerações, cada uma trazendo avanços importantes na tecnologia. No começo, os computadores eram máquinas mecânicas simples, e hoje temos sistemas muito avançados, com inteligência artificial e grande capacidade de processamento. Entender essa evolução é importante para quem faz Análise e Desenvolvimento de Sistemas, pois ajuda a compreender como as tecnologias atuais surgiram e como elas continuam evoluindo.</text:p>
      <text:p text:style-name="Normal"/>
      <text:p text:style-name="P27">Geração 0 – Computadores Mecânicos</text:p>
      <text:p text:style-name="Normal">Período histórico: até a década de 1940<text:line-break/><text:s/>Tecnologia predominante: máquinas mecânicas</text:p>
      <text:p text:style-name="Normal">Essa geração é considerada o início da computação. Os dispositivos eram totalmente mecânicos e serviam principalmente para cálculos matemáticos simples.</text:p>
      <text:p text:style-name="Normal">Principais características:</text:p>
      <text:p text:style-name="Normal">Funcionamento manual ou com pouca automação<text:s/></text:p>
      <text:p text:style-name="Normal">Baixa velocidade<text:s/></text:p>
      <text:p text:style-name="Normal">Não possuíam programação como conhecemos hoje<text:s/></text:p>
      <text:p text:style-name="Normal">Exemplos:</text:p>
      <text:p text:style-name="Normal">Ábaco<text:s/></text:p>
      <text:p text:style-name="Normal">Máquina Analítica de Charles Babbage<text:s/></text:p>
      <text:p text:style-name="Normal">Limitações:</text:p>
      <text:p text:style-name="Normal">Dependência total do ser humano<text:s/></text:p>
      <text:p text:style-name="Normal">Pouca precisão em cálculos mais complexos<text:s/></text:p>
      <text:p text:style-name="Normal">Impacto:<text:line-break/><text:s/>Mesmo sendo simples, essas máquinas foram importantes porque deram início à ideia de automatizar cálculos.</text:p>
      <text:p text:style-name="Normal"/>
      <text:p text:style-name="Normal"/>
      <text:p text:style-name="Normal"/>
      <text:p text:style-name="P28">1ª Geração – Válvulas Eletrônicas</text:p>
      <text:p text:style-name="Normal">Período histórico: 1940 – 1956<text:line-break/><text:s/>Tecnologia predominante: válvulas</text:p>
      <text:p text:style-name="Normal">Nessa geração surgiram os primeiros computadores eletrônicos. Eles eram muito grandes e consumiam muita energia.</text:p>
      <text:p text:style-name="Normal">Principais características:</text:p>
      <text:p text:style-name="Normal">Computadores enormes<text:s/></text:p>
      <text:p text:style-name="Normal">Muito calor durante o funcionamento<text:s/></text:p>
      <text:p text:style-name="Normal">Programação em linguagem de máquina<text:s/></text:p>
      <text:p text:style-name="Normal">Exemplos:</text:p>
      <text:p text:style-name="Normal">ENIAC<text:s/></text:p>
      <text:p text:style-name="Normal">UNIVAC I<text:s/></text:p>
      <text:p text:style-name="Normal">Limitações:</text:p>
      <text:p text:style-name="Normal">Alto custo<text:s/></text:p>
      <text:p text:style-name="Normal">Baixa confiabilidade<text:s/></text:p>
      <text:p text:style-name="Normal">Manutenção difícil<text:s/></text:p>
      <text:p text:style-name="Normal">Impacto:<text:line-break/><text:s/>Foi um avanço importante, pois marcou o início da computação eletrônica, usada principalmente em áreas militares e científicas.</text:p>
      <text:p text:style-name="Normal"/>
      <text:p text:style-name="P29">2ª Geração – Transistores</text:p>
      <text:p text:style-name="Normal">Período histórico: 1956 – 1964<text:line-break/><text:s/>Tecnologia predominante: transistores</text:p>
      <text:p text:style-name="Normal">Os transistores substituíram as válvulas, trazendo melhorias importantes.</text:p>
      <text:p text:style-name="Normal">Principais características:</text:p>
      <text:p text:style-name="Normal">Computadores menores<text:s/></text:p>
      <text:p text:style-name="Normal">Menor consumo de energia<text:s/></text:p>
      <text:p text:style-name="Normal">Mais confiáveis<text:s/></text:p>
      <text:p text:style-name="Normal">Exemplos:</text:p>
      <text:p text:style-name="Normal">IBM 1401<text:s/></text:p>
      <text:p text:style-name="Normal">IBM 7090<text:s/></text:p>
      <text:p text:style-name="Normal">Limitações:</text:p>
      <text:p text:style-name="Normal">Ainda eram caros<text:s/></text:p>
      <text:p text:style-name="Normal">Não eram acessíveis para uso pessoal<text:s/></text:p>
      <text:p text:style-name="Normal">Impacto:<text:line-break/><text:s/>Permitiu maior uso dos computadores em empresas e universidades.</text:p>
      <text:p text:style-name="Normal"/>
      <text:p text:style-name="P30">3ª Geração – Circuitos Integrados</text:p>
      <text:p text:style-name="Normal">Período histórico: 1964 – 1971<text:line-break/><text:s/>Tecnologia predominante: circuitos integrados</text:p>
      <text:p text:style-name="Normal">Nessa fase, vários componentes passaram a ser colocados em um único chip.</text:p>
      <text:p text:style-name="Normal">Principais características:</text:p>
      <text:p text:style-name="Normal">Computadores menores e mais rápidos<text:s/></text:p>
      <text:p text:style-name="Normal">Maior capacidade de processamento<text:s/></text:p>
      <text:p text:style-name="Normal">Surgimento dos primeiros sistemas operacionais<text:s/></text:p>
      <text:p text:style-name="Normal">Exemplo:</text:p>
      <text:p text:style-name="Normal">IBM System/360<text:s/></text:p>
      <text:p text:style-name="Normal">Limitações:</text:p>
      <text:p text:style-name="Normal">Ainda tinham custo elevado<text:s/></text:p>
      <text:p text:style-name="Normal">Impacto:<text:line-break/><text:s/>Facilitou o uso comercial dos computadores e aumentou sua eficiência.</text:p>
      <text:p text:style-name="Normal"/>
      <text:p text:style-name="P31">4ª Geração – Microprocessadores</text:p>
      <text:p text:style-name="Normal">Período histórico: 1971 – atual<text:line-break/><text:s/>Tecnologia predominante: microprocessadores</text:p>
      <text:p text:style-name="Normal">Essa geração é a base dos computadores que usamos hoje.</text:p>
      <text:p text:style-name="Normal">Principais características:</text:p>
      <text:p text:style-name="Normal">Surgimento dos computadores pessoais (PCs)<text:s/></text:p>
      <text:p text:style-name="Normal">Interfaces gráficas<text:s/></text:p>
      <text:p text:style-name="Normal">Uso da internet<text:s/></text:p>
      <text:p text:style-name="Normal">Exemplos:</text:p>
      <text:p text:style-name="Normal">IBM PC<text:s/></text:p>
      <text:p text:style-name="Normal">Apple II<text:s/></text:p>
      <text:p text:style-name="Normal">Limitações:</text:p>
      <text:p text:style-name="Normal">Limitações físicas no avanço dos chips<text:s/></text:p>
      <text:p text:style-name="Normal">Impacto:<text:line-break/><text:s/>Foi a geração que mais mudou a sociedade, pois tornou os computadores acessíveis para muitas pessoas.</text:p>
      <text:p text:style-name="Normal"/>
      <text:p text:style-name="P32">5ª Geração – Inteligência Artificial</text:p>
      <text:p text:style-name="Normal">Período histórico: 1980 – atual<text:line-break/><text:s/>Tecnologia predominante: inteligência artificial e processamento avançado</text:p>
      <text:p text:style-name="Normal">Essa geração<text:s/><text:span text:style-name="T33">continua</text:span><text:s/>em desenvolvimento e envolve tecnologias modernas.</text:p>
      <text:p text:style-name="Normal">Principais características:</text:p>
      <text:p text:style-name="Normal">Uso de inteligência artificial<text:s/></text:p>
      <text:p text:style-name="Normal">Processamento de grandes volumes de dados<text:s/></text:p>
      <text:p text:style-name="Normal">Automação<text:s/></text:p>
      <text:p text:style-name="Normal">Exemplos:</text:p>
      <text:p text:style-name="Normal">Assistentes virtuais<text:s/></text:p>
      <text:p text:style-name="Normal">Sistemas de IA<text:s/></text:p>
      <text:p text:style-name="Normal">Limitações:</text:p>
      <text:p text:style-name="Normal">Alto custo<text:s/></text:p>
      <text:p text:style-name="Normal">Dependência de muitos dados<text:s/></text:p>
      <text:p text:style-name="Normal">Questões éticas<text:s/></text:p>
      <text:p text:style-name="Normal">Impacto:<text:line-break/><text:s/>Está mudando várias áreas, como saúde, educação e tecnologia.</text:p>
      <text:p text:style-name="Normal"/>
      <text:p text:style-name="Normal">Parte Analítica</text:p>
      <text:p text:style-name="Normal">Arquitetura dos computadores</text:p>
      <text:p text:style-name="Normal">Um modelo muito importante é a arquitetura de John von Neumann, usada até hoje como base. Ela define que o computador deve ter processador, memória e dispositivos de entrada e saída.</text:p>
      <text:p text:style-name="Normal">Essa arquitetura é importante porque organiza o funcionamento do computador e permite que programas sejam executados de forma lógica.</text:p>
      <text:p text:style-name="Normal"/>
      <text:p text:style-name="Normal">Diferença entre hardware e software</text:p>
      <text:p text:style-name="Normal">Hardware: parte física do computador, como teclado, memória e processador<text:s/></text:p>
      <text:p text:style-name="Normal">Software: programas que fazem o computador funcionar<text:s/></text:p>
      <text:p text:style-name="Normal">Com o tempo, o hardware foi ficando mais avançado e o software também evoluiu, ficando mais fácil de usar.</text:p>
      <text:p text:style-name="Normal"/>
      <text:p text:style-name="Normal">Evolução do hardware e linguagens</text:p>
      <text:p text:style-name="Normal">No começo, a programação era feita em linguagem de máquina, que era difícil de entender. Com a evolução do hardware, surgiram linguagens mais fáceis, como Python e Java.</text:p>
      <text:p text:style-name="Normal">Isso aconteceu porque computadores mais modernos conseguem processar linguagens mais complexas.</text:p>
      <text:p text:style-name="P34"><text:span text:style-name="T36">TODA MATÉRIA.<text:s/></text:span><text:span text:style-name="T37">História e evolução dos computadores</text:span><text:span text:style-name="T38">. Disponível em:<text:s/></text:span><text:a xlink:href="https://www.todamateria.com.br/historia-e-evolucao-dos-computadores/" office:target-frame-name="_top" xlink:show="replace"><text:span text:style-name="T39">https://www.todamateria.com.br/historia-e-evolucao-dos-computadores/</text:span></text:a><text:span text:style-name="T40">. Acesso em: 05 maio 2026.</text:span></text:p>
      <text:p text:style-name="P41"/>
      <text:p text:style-name="P42"><text:span text:style-name="T43">SONG, Siang Wun.<text:s/></text:span><text:span text:style-name="T44">História da evolução do computador</text:span><text:span text:style-name="T45">. Universidade de São Paulo (USP). Disponível em:<text:s/></text:span><text:a xlink:href="https://www.ime.usp.br/~song/mac344/slides02-evolution.pdf" office:target-frame-name="_top" xlink:show="replace"><text:span text:style-name="T46">https://www.ime.usp.br/~song/mac344/slides02-evolution.pdf</text:span></text:a><text:span text:style-name="T47">. Acesso em: 05 maio 2026.</text:span>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Yu Gothic Light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Yu Gothic Light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Yu Gothic Light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2" style:family="text">
      <style:text-properties style:font-name="Courier New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25" style:parent-style-name="Cabeçalho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35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25"><text:page-number text:fixed="false">2</text:page-number></text:p>
        <text:p text:style-name="Cabeçalho"/>
      </style:header>
    </style:master-page>
    <style:master-page style:name="MP2" style:page-layout-name="PL2">
      <style:header>
        <text:p text:style-name="P3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ís Miguel Schiazza</meta:initial-creator>
    <dc:creator>Luís Miguel Schiazza</dc:creator>
    <meta:creation-date>2026-06-16T17:34:00Z</meta:creation-date>
    <dc:date>2026-06-16T17:34:00Z</dc:date>
    <meta:print-date>2026-04-13T14:22:00Z</meta:print-date>
    <meta:template xlink:href="Normal.dotm" xlink:type="simple"/>
    <meta:editing-cycles>35</meta:editing-cycles>
    <meta:editing-duration>PT0S</meta:editing-duration>
    <meta:document-statistic meta:page-count="1" meta:paragraph-count="10" meta:word-count="830" meta:character-count="5308" meta:row-count="37" meta:non-whitespace-character-count="4488"/>
  </office:meta>
</office:document-meta>
</file>